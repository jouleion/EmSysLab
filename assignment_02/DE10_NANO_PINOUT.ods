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182cm"/>
    </style:style>
    <style:style style:name="co2" style:family="table-column">
      <style:table-column-properties fo:break-before="auto" style:column-width="7.671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2.916cm"/>
    </style:style>
    <style:style style:name="co9" style:family="table-column">
      <style:table-column-properties fo:break-before="auto" style:column-width="1.896cm"/>
    </style:style>
    <style:style style:name="co10" style:family="table-column">
      <style:table-column-properties fo:break-before="auto" style:column-width="4.403cm"/>
    </style:style>
    <style:style style:name="co11" style:family="table-column">
      <style:table-column-properties fo:break-before="auto" style:column-width="6.186cm"/>
    </style:style>
    <style:style style:name="co12" style:family="table-column">
      <style:table-column-properties fo:break-before="auto" style:column-width="5.507cm"/>
    </style:style>
    <style:style style:name="co13" style:family="table-column">
      <style:table-column-properties fo:break-before="auto" style:column-width="5.357cm"/>
    </style:style>
    <style:style style:name="co14" style:family="table-column">
      <style:table-column-properties fo:break-before="auto" style:column-width="7.586cm"/>
    </style:style>
    <style:style style:name="co15" style:family="table-column">
      <style:table-column-properties fo:break-before="auto" style:column-width="6.992cm"/>
    </style:style>
    <style:style style:name="co16" style:family="table-column">
      <style:table-column-properties fo:break-before="auto" style:column-width="5.082cm"/>
    </style:style>
    <style:style style:name="co17" style:family="table-column">
      <style:table-column-properties fo:break-before="auto" style:column-width="6.398cm"/>
    </style:style>
    <style:style style:name="co18" style:family="table-column">
      <style:table-column-properties fo:break-before="auto" style:column-width="6.567cm"/>
    </style:style>
    <style:style style:name="co19" style:family="table-column">
      <style:table-column-properties fo:break-before="auto" style:column-width="3.256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E10_NANO_PIN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 Copyright (C) 2023 <text:s/>Intel Corporation. All rights reserv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 Your use of Intel Corporation's design tools</text:p>
          </table:table-cell>
          <table:table-cell office:value-type="string" calcext:value-type="string">
            <text:p><text:s/>logic functions 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and other software and tools</text:p>
          </table:table-cell>
          <table:table-cell office:value-type="string" calcext:value-type="string">
            <text:p><text:s/>and any partner logic 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functions</text:p>
          </table:table-cell>
          <table:table-cell office:value-type="string" calcext:value-type="string">
            <text:p><text:s/>and any output files from any of the foregoing 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(including device programming or simulation files)</text:p>
          </table:table-cell>
          <table:table-cell office:value-type="string" calcext:value-type="string">
            <text:p><text:s/>and any 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associated documentation or information are expressly subject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 to the terms and conditions of the Intel Program License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 Subscription Agreement</text:p>
          </table:table-cell>
          <table:table-cell office:value-type="string" calcext:value-type="string">
            <text:p><text:s/>the Intel Quartus Prime License Agree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he Intel FPGA IP License Agreement</text:p>
          </table:table-cell>
          <table:table-cell office:value-type="string" calcext:value-type="string">
            <text:p><text:s/>or other applicable licen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agreement</text:p>
          </table:table-cell>
          <table:table-cell office:value-type="string" calcext:value-type="string">
            <text:p><text:s/>including</text:p>
          </table:table-cell>
          <table:table-cell office:value-type="string" calcext:value-type="string">
            <text:p><text:s/>without limitation</text:p>
          </table:table-cell>
          <table:table-cell office:value-type="string" calcext:value-type="string">
            <text:p><text:s/>that your use is fo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 the sole purpose of programming logic devices manufacture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 Intel and sold by Intel or its authorized distributors. <text:s/>Plea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 refer to the applicable agreement for further details</text:p>
          </table:table-cell>
          <table:table-cell office:value-type="string" calcext:value-type="string">
            <text:p><text:s/>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https://fpgasoftware.intel.com/eula.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# Quartus Prime Version 23.1std.0 Build 991 11/28/2023 SC Lite Edi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 File: /media/hidde/fedora_localhost-live1/home/hidde/Documents/Uni/ESL_TA/QuartusMeuk/AssignmentCheck/DE10_NANO_PINOUT.cs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 Generated on: Sun Apr 28 13:38:40 2024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# Note: The column header names should not be changed if you wish to import this .csv file into the Quartus Prime software.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VREF Group</text:p>
          </table:table-cell>
          <table:table-cell office:value-type="string" calcext:value-type="string">
            <text:p>I/O Standard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Current Strength</text:p>
          </table:table-cell>
          <table:table-cell office:value-type="string" calcext:value-type="string">
            <text:p>Slew Rate</text:p>
          </table:table-cell>
          <table:table-cell office:value-type="string" calcext:value-type="string">
            <text:p>Differential Pair</text:p>
          </table:table-cell>
          <table:table-cell office:value-type="string" calcext:value-type="string">
            <text:p>Transceiver Analog Settings Protocol</text:p>
          </table:table-cell>
          <table:table-cell office:value-type="string" calcext:value-type="string">
            <text:p>VCCR_GXB/VCCT_GXB Voltage</text:p>
          </table:table-cell>
          <table:table-cell office:value-type="string" calcext:value-type="string">
            <text:p>Transceiver I/O Pin Termination</text:p>
          </table:table-cell>
          <table:table-cell office:value-type="string" calcext:value-type="string">
            <text:p>Transceiver Dedicated Refclk Pin Termination</text:p>
          </table:table-cell>
          <table:table-cell office:value-type="string" calcext:value-type="string">
            <text:p>Transmitter Common Mode Driver Voltage</text:p>
          </table:table-cell>
          <table:table-cell office:value-type="string" calcext:value-type="string">
            <text:p>Transmitter Slew Rate Control</text:p>
          </table:table-cell>
          <table:table-cell office:value-type="string" calcext:value-type="string">
            <text:p>Transmitter Differential Output Voltage</text:p>
          </table:table-cell>
          <table:table-cell office:value-type="string" calcext:value-type="string">
            <text:p>Receiver Buffer Common Mode Voltage</text:p>
          </table:table-cell>
          <table:table-cell office:value-type="string" calcext:value-type="string">
            <text:p>Strict Preservation</text:p>
          </table:table-cell>
        </table:table-row>
        <table:table-row table:style-name="ro1">
          <table:table-cell office:value-type="string" calcext:value-type="string">
            <text:p>FPGA_CLK1_5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V1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_CLK2_5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Y13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B4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_CLK3_5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E11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B8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I2C_SC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U1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3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I2C_SD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A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3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I2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T1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LRCL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T1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MCL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U1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SCL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T1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CL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G5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D1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B4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0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D1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1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E1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2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W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3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3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Y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3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4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D1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5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D1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6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E1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7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Y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3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8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F1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9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Y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3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10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E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11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B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3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12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E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13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F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14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F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15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F5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16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E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17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H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18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H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19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H5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20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H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21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G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22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F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D[23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E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H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T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3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I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F1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3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MI_TX_V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V13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B4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CONV_USB_N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ADDR[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4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5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6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7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8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9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1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1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1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1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ADDR[14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BA[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BA[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BA[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CAS_N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CKE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CK_N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CK_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CK_P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CK_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CS_N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DM[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M[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M[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M[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S_N[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N[0](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N[0](n)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N[0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N[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N[1](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N[1](n)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N[1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N[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N[2](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N[2](n)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N[2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N[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N[3](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N[3](n)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N[3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P[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P[0](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P[0](n)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P[0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P[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P[1](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P[1](n)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P[1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P[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P[2](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P[2](n)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P[2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P[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P[3](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S_P[3](n)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ifferential 1.5-V SSTL Class I</text:p>
          </table:table-cell>
          <table:table-cell table:number-columns-repeated="3"/>
          <table:table-cell office:value-type="string" calcext:value-type="string">
            <text:p>HPS_DDR3_DQS_P[3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S_DDR3_DQ[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4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5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6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7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8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9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1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1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1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1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14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15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16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17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18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19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2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2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2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2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24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25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26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27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28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29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3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DQ[3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ODT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RAS_N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RESET_N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DDR3_RZQ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DDR3_WE_N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SSTL-15 Class I</text:p>
          </table:table-cell>
          <table:table-cell/>
          <table:table-cell office:value-type="string" calcext:value-type="string">
            <text:p>maximum curr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S_ENET_GTX_CLK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INT_N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MDC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MDIO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RX_CLK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RX_DATA[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RX_DATA[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RX_DATA[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RX_DATA[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RX_DV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TX_DATA[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TX_DATA[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TX_DATA[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TX_DATA[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ENET_TX_EN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GSENSOR_INT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I2C0_SCLK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I2C0_SDAT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I2C1_SCLK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I2C1_SDAT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KEY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LED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LTC_GPIO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SD_CLK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SD_CMD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SD_DATA[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SD_DATA[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SD_DATA[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SD_DATA[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SPIM_CLK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SPIM_MISO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SPIM_MOSI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SPIM_SS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ART_RX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ART_TX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CLKOUT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DATA[0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DATA[1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DATA[2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DATA[3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DATA[4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DATA[5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DATA[6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DATA[7]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DIR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NXT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PS_USB_STP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Y[0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H17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B4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Y[1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H1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B4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W1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5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A2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5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[2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V1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5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[3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V1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5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[4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F2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5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[5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E2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5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[6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Y1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5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[7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AA23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5A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[0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Y2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B5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[1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W2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B5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[2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W2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B5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[3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IN_W2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B5B_N0</text:p>
          </table:table-cell>
          <table:table-cell office:value-type="string" calcext:value-type="string">
            <text:p>3.3-V LVTTL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28T09:37:51.350019600</dc:date>
    <meta:editing-duration>PT2M11S</meta:editing-duration>
    <meta:editing-cycles>1</meta:editing-cycles>
    <meta:document-statistic meta:table-count="1" meta:cell-count="786" meta:object-count="0"/>
    <meta:generator>LibreOffice/26.2.0.3$Windows_X86_64 LibreOffice_project/620$Build-3</meta:generator>
  </office:meta>
</office:document-meta>
</file>